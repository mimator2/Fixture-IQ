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text-align="start" style:justify-single-word="false"/>
      <style:text-properties fo:font-size="12pt" fo:font-weight="normal" style:font-size-asian="10.5pt" style:font-weight-asian="normal" style:font-size-complex="12pt" style:font-weight-complex="normal"/>
    </style:style>
    <style:style style:name="P2" style:family="paragraph" style:parent-style-name="Heading_20_2">
      <style:paragraph-properties fo:text-align="start" style:justify-single-word="false"/>
      <style:text-properties fo:font-size="15pt" fo:font-weight="bold" style:font-size-asian="15pt" style:font-weight-asian="bold" style:font-size-complex="15pt" style:font-weight-complex="bold"/>
    </style:style>
    <style:style style:name="P3" style:family="paragraph" style:parent-style-name="Heading_20_2">
      <style:paragraph-properties fo:text-align="start"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Text_20_body" style:list-style-name="L1"/>
    <style:style style:name="P8" style:family="paragraph" style:parent-style-name="Text_20_body" style:list-style-name="L1">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Fixture Congestion and Competitive Performance: A Data-Driven Analysis of Match Density, Rotation, and Performance in Premier League Clubs Competing in Europe</text:p>
      <text:p text:style-name="P4"/>
      <text:p text:style-name="P5">This project explores whether fixture congestion affects the performance and squad rotation of Premier League clubs competing in European competitions. The main problem addressed is the increasing density of match calendars and its possible impact on competitive outcomes and player-management decisions. The project will use match schedule, results, lineup, minutes, and team-performance data to construct congestion indicators such as rest days and matches played in short time windows. These indicators will then be related to performance variables like points, results, goal difference, and expected goals, as well as squad-rotation patterns. The project will culminate in a prototype dashboard that identifies congested periods, compares performance in different scheduling conditions, and supports decision-making for analysts and coaching staff.</text:p>
      <text:p text:style-name="P5"/>
      <text:h text:style-name="P1" text:outline-level="2">Data sources</text:h>
      <text:list xml:id="list1508332538" text:style-name="L1">
        <text:list-item>
          <text:p text:style-name="P8">Premier League official fixtures and results </text:p>
        </text:list-item>
        <text:list-item>
          <text:p text:style-name="P8">UEFA official fixtures and results </text:p>
        </text:list-item>
        <text:list-item>
          <text:p text:style-name="P8">FBref </text:p>
        </text:list-item>
        <text:list-item>
          <text:p text:style-name="P8">Understat </text:p>
        </text:list-item>
        <text:list-item>
          <text:p text:style-name="P7">Transfermarkt</text:p>
        </text:list-item>
      </text:list>
      <text:h text:style-name="P2" text:outline-level="2">Technical solution</text:h>
      <text:p text:style-name="Text_20_body">The project will develop a data-driven analytical framework to quantify fixture congestion and evaluate its association with team performance and rotation. Data will be collected from public football sources, cleaned and integrated into a structured dataset, and processed using Python. Congestion metrics will be generated from the calendar, such as days of rest and match density over rolling periods. These metrics will then be analysed against performance and squad-usage variables using descriptive statistics and regression-based methods. Finally, a prototype dashboard will be created to visualize congestion windows, performance differences, and squad-rotation behaviour in a practical and accessible way.</text:p>
      <text:h text:style-name="P3" text:outline-level="2">Research side</text:h>
      <text:p text:style-name="Text_20_body"><text:span text:style-name="Strong_20_Emphasis">Does fixture congestion affect performance and rotation in Premier League clubs competing in Europe?</text:span></text:p>
      <text:h text:style-name="Heading_20_2" text:outline-level="2">Industry side</text:h>
      <text:p text:style-name="Text_20_body"><text:span text:style-name="Strong_20_Emphasis">Can we build a prototype that detects congestion and helps clubs manage it more effectively?</text:spa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5T17:44:04.967342446</meta:creation-date>
    <dc:date>2026-04-15T18:01:08.726043171</dc:date>
    <meta:editing-duration>PT6M53S</meta:editing-duration>
    <meta:editing-cycles>1</meta:editing-cycles>
    <meta:document-statistic meta:table-count="0" meta:image-count="0" meta:object-count="0" meta:page-count="1" meta:paragraph-count="14" meta:word-count="291" meta:character-count="2085" meta:non-whitespace-character-count="1809"/>
    <meta:generator>LibreOffice/7.3.7.2$Linux_X86_64 LibreOffice_project/30$Build-2</meta:generator>
  </office:meta>
</office:document-meta>
</file>